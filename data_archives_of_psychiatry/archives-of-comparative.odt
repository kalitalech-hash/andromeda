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17600000DEE1D0A6598.png" manifest:media-type="image/png"/>
  <manifest:file-entry manifest:full-path="Pictures/1000000100000F1E0000081A1D2546D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5.634cm"/>
    </style:style>
    <style:style style:name="Tabela1.B" style:family="table-column">
      <style:table-column-properties style:column-width="2.427cm"/>
    </style:style>
    <style:style style:name="Tabela1.C" style:family="table-column">
      <style:table-column-properties style:column-width="1.598cm"/>
    </style:style>
    <style:style style:name="Tabela1.D" style:family="table-column">
      <style:table-column-properties style:column-width="2.768cm"/>
    </style:style>
    <style:style style:name="Tabela1.E" style:family="table-column">
      <style:table-column-properties style:column-width="4.574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992cm"/>
    </style:style>
    <style:style style:name="Tabela2.B" style:family="table-column">
      <style:table-column-properties style:column-width="13.009cm"/>
    </style:style>
    <style:style style:name="Tabela2.A1" style:family="table-cell">
      <style:table-cell-properties style:vertical-align="middle" fo:padding="0.049cm" fo:border="none"/>
    </style:style>
    <style:style style:name="Tabela3" style:family="table">
      <style:table-properties style:width="14.058cm" table:align="left"/>
    </style:style>
    <style:style style:name="Tabela3.A" style:family="table-column">
      <style:table-column-properties style:column-width="5.634cm"/>
    </style:style>
    <style:style style:name="Tabela3.B" style:family="table-column">
      <style:table-column-properties style:column-width="2.069cm"/>
    </style:style>
    <style:style style:name="Tabela3.C" style:family="table-column">
      <style:table-column-properties style:column-width="2.092cm"/>
    </style:style>
    <style:style style:name="Tabela3.E" style:family="table-column">
      <style:table-column-properties style:column-width="2.171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7.853cm"/>
    </style:style>
    <style:style style:name="Tabela4.B" style:family="table-column">
      <style:table-column-properties style:column-width="2.014cm"/>
    </style:style>
    <style:style style:name="Tabela4.D" style:family="table-column">
      <style:table-column-properties style:column-width="5.119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4.718cm"/>
    </style:style>
    <style:style style:name="Tabela5.B" style:family="table-column">
      <style:table-column-properties style:column-width="4.501cm"/>
    </style:style>
    <style:style style:name="Tabela5.C" style:family="table-column">
      <style:table-column-properties style:column-width="7.781cm"/>
    </style:style>
    <style:style style:name="Tabela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text-properties fo:font-weight="bold" officeooo:rsid="0005c6cf" officeooo:paragraph-rsid="0005c6cf"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sychotherapy on the Map of Mental Health Discourse: A Comparative Bibliometric and Semantic Analysis of Three Journals, 2005–2025</text:span></text:p>
      <text:h text:style-name="Heading_20_2" text:outline-level="2">ntroduction</text:h>
      <text:p text:style-name="Text_20_body">Bibliometric analysis is one of the basic tools for examining the structure and evolution of scientific discourse. By using quantitative methods to analyse publication metadata, such as citations, keywords, co-occurrences, and temporal distributions, it offers insight into the development of specific fields of knowledge, the identification of dominant research paradigms, and the mapping of relationships between thematic areas [1,2]. In recent years, bibliometric methods have become increasingly important in studies of the structure of science, enabling analyses of both global research trends and the specific profiles of individual disciplines, journals, and scholarly communities.</text:p>
      <text:p text:style-name="Text_20_body">One of the established techniques in bibliometric research is keyword analysis. Keywords may be treated as condensed representations of the thematic content of scientific articles. Although they do not capture the full complexity of an article, they provide a useful index of how authors position their work within a scientific field. The analysis of keyword frequency and co-occurrence makes it possible to identify the main thematic areas within a given corpus of publications and to trace changes in these areas over time [3,4]. In this sense, keyword-based bibliometric analysis allows researchers to construct thematic maps of scientific fields and to represent their “intellectual landscape”.</text:p>
      <text:p text:style-name="Text_20_body">Bibliometric methods have also been increasingly applied in research on psychotherapy, psychiatry, and clinical psychology [5,6]. Such analyses make it possible to identify dominant theoretical orientations, changing clinical priorities, emerging treatment models, and the growing importance of new research domains, including evidence-based interventions, digital technologies, trauma-related research, transdiagnostic approaches, and public mental health. In particular, keyword analysis may reveal shifts between diagnostic, therapeutic, methodological, and psychosocial dimensions of mental health discourse.</text:p>
      <text:p text:style-name="Text_20_body">The present study builds on two previously conducted bibliometric and semantic analyses of Polish mental health journals: <text:span text:style-name="Emphasis">Psychoterapia</text:span> and <text:span text:style-name="Emphasis">Psychiatria Polska</text:span> [reference — accepted 05.2026; reference — accepted 05.2026]. The first of these studies examined the thematic evolution of <text:span text:style-name="Emphasis">Psychoterapia</text:span> as a journal centred on psychotherapeutic theory and clinical practice. The second analysed <text:span text:style-name="Emphasis">Psychiatria Polska</text:span> as a major psychiatric journal representing a broader clinical, diagnostic, epidemiological, pharmacological, and institutional discourse. Together, these two studies provided separate maps of two important segments of the Polish mental health field: the psychotherapeutic and the psychiatric.</text:p>
      <text:p text:style-name="Text_20_body">The current article extends that research programme by incorporating a third corpus: <text:span text:style-name="Emphasis">Archives of Psychiatry and Psychotherapy</text:span>. This journal occupies an intermediate position between psychiatry, psychotherapy, and clinical psychology. Its thematic profile includes work on psychiatric disorders, psychotherapeutic interventions, psychological functioning, clinical assessment, rehabilitation, and psychosocial contexts of mental health. For this reason, it provides a particularly useful bridge between the two previously analysed corpora. By adding <text:span text:style-name="Emphasis">Archives of Psychiatry and Psychotherapy</text:span> to the comparison, it becomes possible to move from separate journal-level analyses toward a broader reconstruction of the scientific discourse surrounding psychotherapy and mental health.</text:p>
      <text:p text:style-name="Text_20_body"><text:soft-page-break/>The aim of this study is therefore not only to compare the thematic profiles of three journals. Its broader aim is to examine the position of psychotherapy within the scientific discourse of mental health. In contemporary debates, psychotherapy is sometimes discussed either as a clinical method of treating mental disorders or as a broader practice of personal development, self-exploration, relational growth, or improvement of life effectiveness. A bibliometric analysis cannot resolve professional, regulatory, or normative questions directly. It can, however, show how psychotherapy is situated in scientific discourse: whether it appears primarily in connection with mental disorders, diagnosis, clinical intervention, rehabilitation, patient functioning, and mental health care, or whether it is more strongly associated with non-clinical themes of self-development and personal growth.</text:p>
      <text:p text:style-name="Text_20_body">This question is particularly important in contexts where the professional status and institutional location of psychotherapy remain contested. The scientific discourse of psychotherapy does not determine how the profession should be regulated, but it can provide empirical evidence about the conceptual neighbourhood in which psychotherapy is located. If psychotherapy consistently appears in close connection with psychiatry, clinical psychology, psychopathology, intervention, trauma, depression, anxiety, personality disorders, psychosis, rehabilitation, and patient functioning, then its scientific position is primarily clinical. If, on the other hand, it appears mainly in relation to personal development, general self-improvement, existential exploration, or lifestyle effectiveness, then a different interpretation of its disciplinary location would be more plausible.</text:p>
      <text:p text:style-name="Text_20_body">The three journals analysed in this study provide a useful basis for addressing this question because they represent different poles of the same broad field. <text:span text:style-name="Emphasis">Psychoterapia</text:span> makes it possible to examine psychotherapy from within its own professional and theoretical discourse. <text:span text:style-name="Emphasis">Psychiatria Polska</text:span> makes it possible to observe how psychotherapy appears within the broader psychiatric field. <text:span text:style-name="Emphasis">Archives of Psychiatry and Psychotherapy</text:span> provides a hybrid perspective, showing how psychiatric diagnosis, psychotherapy, clinical psychology, and psychosocial functioning are combined in a single journal corpus. Taken together, these three corpora allow us to reconstruct a broader map of the scientific discourse surrounding psychotherapy and mental health between 2005 and 2025.</text:p>
      <text:p text:style-name="Text_20_body">Previous bibliometric studies in psychotherapy and psychiatry have often focused on specific disorders, treatment methods, citation patterns, or international research trends. Fewer studies have examined the long-term thematic structure of entire journal corpora, especially in Central and Eastern European mental health discourse. Even fewer have attempted to compare journals representing psychotherapy, psychiatry, and hybrid psychiatric-psychotherapeutic perspectives within a common semantic framework. The present study addresses this gap by integrating the previously described analyses of <text:span text:style-name="Emphasis">Psychoterapia</text:span> and <text:span text:style-name="Emphasis">Psychiatria Polska</text:span> with the newly conducted analysis of <text:span text:style-name="Emphasis">Archives of Psychiatry and Psychotherapy</text:span>. This comparative design allows for the identification of both journal-specific thematic profiles and broader patterns shared across the scientific discourse of mental health.</text:p>
      <text:p text:style-name="Text_20_body">The study is based on a human-in-the-loop bibliometric pipeline developed across the three analyses. For each corpus, article metadata and author-assigned keywords were collected, cleaned, normalized, translated where necessary, semantically aggregated, and analysed across comparable temporal periods. Particular attention was paid to maintaining auditability: transformations from raw keywords to final analytical concepts were documented, and potentially ambiguous categories were subjected to manual review. This approach makes it possible to compare not only individual keywords, but broader thematic families across journals.</text:p>
      <text:p text:style-name="Text_20_body"><text:soft-page-break/>The following research questions guided the analysis:</text:p>
      <text:list text:style-name="L2">
        <text:list-item>
          <text:p text:style-name="P4">What themes dominate in the three journal corpora between 2005 and 2025? </text:p>
        </text:list-item>
        <text:list-item>
          <text:p text:style-name="P4">How do the thematic profiles of <text:span text:style-name="Emphasis">Psychoterapia</text:span>, <text:span text:style-name="Emphasis">Psychiatria Polska</text:span>, and <text:span text:style-name="Emphasis">Archives of Psychiatry and Psychotherapy</text:span> differ? </text:p>
        </text:list-item>
        <text:list-item>
          <text:p text:style-name="P4">What temporal changes can be identified in the thematic structure of each journal? </text:p>
        </text:list-item>
        <text:list-item>
          <text:p text:style-name="P4">What thematic relationships are revealed by keyword co-occurrence analysis within and across the corpora? </text:p>
        </text:list-item>
        <text:list-item>
          <text:p text:style-name="P4">How is psychotherapy positioned within the broader scientific discourse of psychiatry, clinical psychology, and mental health? </text:p>
        </text:list-item>
        <text:list-item>
          <text:p text:style-name="P3">Does the comparative keyword map support an understanding of psychotherapy primarily as a clinical method situated in the treatment of mental disorders and mental suffering, or rather as a broader practice of personal development and self-exploration? </text:p>
        </text:list-item>
      </text:list>
      <text:p text:style-name="Text_20_body">Answering these questions allows us to move beyond a purely descriptive comparison of three journals. The analysis aims to reconstruct the place of psychotherapy on the broader map of mental health discourse. In doing so, it examines whether psychotherapy is represented as an autonomous field, as a subdomain of psychiatry, as part of clinical psychology, or as an integrative clinical practice linking diagnosis, intervention, relational processes, patient functioning, and psychosocial context.</text:p>
      <text:p text:style-name="Text_20_body"/>
      <text:h text:style-name="Heading_20_2" text:outline-level="2">Method</text:h>
      <text:p text:style-name="Text_20_body">The study was designed as a comparative bibliometric and semantic analysis of three journal corpora representing different but overlapping segments of the mental health field: <text:span text:style-name="Emphasis">Psychoterapia</text:span>, <text:span text:style-name="Emphasis">Psychiatria Polska</text:span>, and <text:span text:style-name="Emphasis">Archives of Psychiatry and Psychotherapy</text:span>. The analysis covered the period 2005–2025 and focused on author-assigned keywords as condensed indicators of the thematic positioning of articles. The overall aim was to compare the thematic profiles of the three journals and to examine how psychotherapy is situated within the broader scientific discourse of psychiatry, clinical psychology, and mental health.</text:p>
      <text:h text:style-name="Heading_20_3" text:outline-level="3">Corpora and data sources</text:h>
      <text:p text:style-name="Text_20_body">The study used three journal-level corpora. The first corpus consisted of articles published in <text:span text:style-name="Emphasis">Psychoterapia</text:span>, a journal focused primarily on psychotherapeutic theory, clinical practice, therapeutic modalities, and the process of psychotherapy. The second corpus consisted of articles published in <text:span text:style-name="Emphasis">Psychiatria Polska</text:span>, a major Polish psychiatric journal representing a broader clinical and institutional psychiatric discourse, including diagnosis, treatment, epidemiology, pharmacotherapy, neuropsychiatry, and mental health services. The third corpus consisted of articles published in <text:span text:style-name="Emphasis">Archives of Psychiatry and Psychotherapy</text:span>, a journal situated at the intersection of psychiatry, psychotherapy, and clinical psychology.</text:p>
      <text:p text:style-name="Text_20_body">The analyses of <text:span text:style-name="Emphasis">Psychoterapia</text:span> and <text:span text:style-name="Emphasis">Psychiatria Polska</text:span> had been conducted and described previously [reference — accepted 05.2026; reference — accepted 05.2026]. The present study incorporated these two earlier corpora as comparative reference points and extended the research programme by adding a newly prepared corpus of <text:span text:style-name="Emphasis">Archives of Psychiatry and Psychotherapy</text:span>. This third corpus was processed using the refined version of the same human-in-the-loop bibliometric <text:soft-page-break/>pipeline, with particular attention to quality control, semantic normalization, auditability, and comparability with the two earlier analyses.</text:p>
      <text:h text:style-name="Heading_20_3" text:outline-level="3">Data collection for <text:span text:style-name="Emphasis">Archives of Psychiatry and Psychotherapy</text:span></text:h>
      <text:p text:style-name="Text_20_body">Data for <text:span text:style-name="Emphasis">Archives of Psychiatry and Psychotherapy</text:span> were collected through automated scraping of the journal’s website. A Python script was used to search the online archive, identify individual issues, visit article pages, and extract available metadata, including article title, publication year, volume, issue number, DOI, article URL, and author-assigned keywords. The keywords were extracted directly from the HTML structure of article pages, from the section labelled “KEYWORDS”; therefore, PDF parsing was not required.</text:p>
      <text:p text:style-name="Text_20_body">The scraping procedure produced separate tabular files for journal issues, article metadata, keyword records in long format, and a scraping log. The raw dataset was then subjected to quality control and deduplication. This step was necessary because several article links were collected repeatedly from global page elements, most likely sections such as “latest” or “recommended” articles, rather than from the table of contents of individual issues. Duplicate records were identified and removed using the article identifier as the primary deduplication key. Records outside the analytical range were also excluded.</text:p>
      <text:p text:style-name="Text_20_body">After quality control, the working corpus for <text:span text:style-name="Emphasis">Archives of Psychiatry and Psychotherapy</text:span> covered the years 2005–2025 and contained 730 unique article records and 2,737 keyword-long records. Sixteen articles had no assigned keywords and were documented separately. Subsequent keyword-based analyses were conducted on the keyword-bearing part of the corpus.</text:p>
      <text:h text:style-name="Heading_20_3" text:outline-level="3">Keyword normalization and semantic aggregation</text:h>
      <text:p text:style-name="Text_20_body">All three corpora were processed according to a comparable logic of keyword normalization and semantic aggregation. The purpose of this procedure was to reduce superficial terminological variation and to construct an analytical vocabulary suitable for frequency, trend, and co-occurrence analysis.</text:p>
      <text:p text:style-name="Text_20_body">For the <text:span text:style-name="Emphasis">Archives of Psychiatry and Psychotherapy</text:span> corpus, the first stage consisted of technical normalization of keywords. This included conversion to lowercase, Unicode normalization, trimming and reduction of whitespace, standardization of hyphens and slashes, removal of final punctuation, and replacement of the ampersand sign with the word “and”. The original keyword was preserved in a separate column so that the transformation from raw keyword to normalized form remained auditable. No translation or broad semantic merging was performed at this stage. Technical normalization reduced the number of unique raw keyword variants from 1,743 to 1,699.</text:p>
      <text:p text:style-name="Text_20_body">The second stage involved Polish translation, semantic standardization, and aggregation of keyword variants into analytical concepts. This procedure was iterative. First, obvious equivalents and terminological variants were merged conservatively, including singular and plural forms, British and American spellings, punctuation variants, and unambiguous abbreviations. For example, variants such as “CBT”, “cognitive-behavioral therapy”, and “cognitive behavioural therapy” were mapped to one common analytical concept. Similarly, “PTSD” and “post-traumatic stress disorder” were treated as variants of the same concept.</text:p>
      <text:p text:style-name="Text_20_body">In subsequent iterations, broader semantic aggregation was performed. Editorial and non-substantive keyword categories, especially variants of “editorial”, were excluded from the analytical <text:soft-page-break/>corpus. The remaining terms were mapped to broader thematic families when the semantic relationship was sufficiently clear. This stage went beyond simple synonym merging and moved toward the construction of analytically useful thematic categories. For example, terms referring to schizophrenia, psychosis, psychotic symptoms, hallucinations, and delusions were aggregated into the concept “schizophrenia and psychotic disorders”. Depression-related terms were aggregated into “depression and depressive disorders”, and anxiety-related terms into “anxiety and anxiety disorders”.</text:p>
      <text:p text:style-name="Text_20_body">The semantic aggregation process combined automated rule-based procedures with human-in-the-loop audit. After the automatic stages, a set of 73 concepts in the <text:span text:style-name="Emphasis">Archives of Psychiatry and Psychotherapy</text:span> corpus was flagged for strong audit because of unclear scope, technical form, or insufficient semantic stability. These concepts were manually reviewed and excluded from the final analytical layer. The final <text:span text:style-name="Emphasis">Archives</text:span> dataset contained 2,573 keyword-long records, 684 articles with at least one analytical keyword, and 515 unique Polish analytical concepts. Compared with the 1,743 unique raw keyword variants identified after quality control, this represented a reduction of approximately 70.45%.</text:p>
      <text:p text:style-name="Text_20_body">The earlier corpora of <text:span text:style-name="Emphasis">Psychoterapia</text:span> and <text:span text:style-name="Emphasis">Psychiatria Polska</text:span> were also based on semantic keyword normalization and aggregation procedures described in the previous studies [reference — accepted 05.2026; reference — accepted 05.2026]. For the purposes of the present comparative analysis, the previously generated analytical layers were used to identify dominant thematic families, temporal tendencies, and journal-specific profiles. Because the three corpora had not originally been produced in a single unified run, the comparative interpretation was conducted at the level of broader semantic categories rather than at the level of exact raw keyword strings.</text:p>
      <text:h text:style-name="Heading_20_3" text:outline-level="3">Periodization</text:h>
      <text:p text:style-name="Text_20_body">For temporal analysis, the corpora were divided into comparable analytical periods. The main periodization followed the scheme used in the earlier analysis of <text:span text:style-name="Emphasis">Psychoterapia</text:span>: 2005–2009, 2010–2014, 2015–2019, and 2020–2025. Each keyword record was assigned to one of these periods based on the publication year of the corresponding article.</text:p>
      <text:p text:style-name="Text_20_body">For <text:span text:style-name="Emphasis">Archives of Psychiatry and Psychotherapy</text:span>, the periodized dataset contained no records outside the analytical range and no records with missing publication year. The distribution of articles across periods was as follows: 144 articles in 2005–2009, 161 in 2010–2014, 177 in 2015–2019, and 202 in 2020–2025. This periodization enabled comparison of thematic change across journals, while also reducing the influence of short-term annual fluctuations.</text:p>
      <text:h text:style-name="Heading_20_3" text:outline-level="3">Bibliometric analyses within each corpus</text:h>
      <text:p text:style-name="Text_20_body">Within each corpus, several complementary bibliometric analyses were performed. First, descriptive statistics were calculated for the frequency of analytical concepts in the entire corpus and in each period. Frequencies were calculated at the article level, so that a concept was counted once per article, even if multiple related keyword records were present. This procedure reduced the influence of repeated keyword variants within the same article.</text:p>
      <text:p text:style-name="Text_20_body">Second, temporal trend analysis was conducted by comparing the relative frequency of analytical concepts across the four periods. This made it possible to identify rising, declining, emerging, and persistent themes. Particular attention was paid to the difference between the first and the last <text:soft-page-break/>period, expressed both in article counts and in percentage-point differences. This relative approach was necessary because the number of articles differed across periods and across journals.</text:p>
      <text:p text:style-name="Text_20_body">Third, keyword co-occurrence analysis was conducted. The co-occurrence network was built at the article level: two analytical concepts were connected by an edge if they appeared in the same article. For the <text:span text:style-name="Emphasis">Archives of Psychiatry and Psychotherapy</text:span> corpus, the full co-occurrence network included 1,807 pairwise co-occurrence edges. For interpretive purposes, a filtered network was also constructed using a minimum edge weight of 3, meaning that only pairs of concepts co-occurring in at least three articles were retained. This filtered network contained 51 nodes, 181 edges, and 4 thematic communities.</text:p>
      <text:p text:style-name="Text_20_body">Community detection was then applied to the filtered co-occurrence network using a modularity-based algorithm. This allowed the identification of groups of concepts that were more strongly connected with each other than with the rest of the network. Network measures, including degree, weighted degree, and betweenness centrality, were used to describe the relative position of concepts within the network.</text:p>
      <text:h text:style-name="Heading_20_3" text:outline-level="3">Comparative analysis across journals</text:h>
      <text:p text:style-name="Text_20_body">The comparative stage of the study focused on the relationship between the three journal-specific thematic maps. Because the corpora differed in scope, journal profile, language structure, and processing history, the comparison was conducted at the level of broader analytical categories rather than at the level of individual raw keywords.</text:p>
      <text:p text:style-name="Text_20_body">The comparison proceeded in four steps. First, dominant themes in each corpus were identified and interpreted as indicators of the journal’s thematic centre. This made it possible to distinguish, for example, the psychotherapeutic-process orientation of <text:span text:style-name="Emphasis">Psychoterapia</text:span>, the psychiatric-clinical and institutional orientation of <text:span text:style-name="Emphasis">Psychiatria Polska</text:span>, and the hybrid clinical-psychological orientation of <text:span text:style-name="Emphasis">Archives of Psychiatry and Psychotherapy</text:span>.</text:p>
      <text:p text:style-name="Text_20_body">Second, temporal tendencies were compared across corpora. Particular attention was paid to themes that appeared to grow across the mental health field more broadly, such as digital and online forms of care, COVID-19, trauma-related categories, intervention-oriented themes, and transdiagnostic constructs such as anxiety, emotion regulation, and psychosocial functioning. At the same time, journal-specific trajectories were preserved rather than forced into a single common ranking.</text:p>
      <text:p text:style-name="Text_20_body">Third, co-occurrence structures were compared qualitatively. The aim was not to merge all networks into one artificial super-network, but to identify how psychotherapy, psychiatric diagnosis, clinical psychology, and psychosocial functioning were positioned within each journal’s thematic space. This allowed the identification of three complementary levels of discourse: a psychotherapeutic-process level represented by <text:span text:style-name="Emphasis">Psychoterapia</text:span>, a psychiatric-diagnostic and institutional level represented by <text:span text:style-name="Emphasis">Psychiatria Polska</text:span>, and an intermediate clinical-integrative level represented by <text:span text:style-name="Emphasis">Archives of Psychiatry and Psychotherapy</text:span>.</text:p>
      <text:p text:style-name="Text_20_body">Fourth, the position of psychotherapy was examined across the three corpora. The analysis asked whether psychotherapy appeared mainly in connection with clinical categories such as mental disorders, diagnosis, trauma, depression, anxiety, personality disorders, psychosis, rehabilitation, intervention, and patient functioning, or whether it was more strongly associated with themes of general personal development, lifestyle effectiveness, or self-improvement. This comparative <text:soft-page-break/>interpretive step was used to address the broader research question concerning the clinical position of psychotherapy within scientific mental health discourse.</text:p>
      <text:h text:style-name="Heading_20_3" text:outline-level="3">Software and reproducibility</text:h>
      <text:p text:style-name="Text_20_body">All analyses were conducted using Python scripts developed as part of the project. Data processing and tabular analysis were performed with <text:span text:style-name="Source_20_Text">pandas</text:span> and <text:span text:style-name="Source_20_Text">numpy</text:span>, while co-occurrence networks and community detection were implemented using <text:span text:style-name="Source_20_Text">networkx</text:span>. Visualizations were generated using <text:span text:style-name="Source_20_Text">matplotlib</text:span> and spring-layout algorithms for network representation. The scripts, data-processing logic, and documentation were organized in the project repository: <text:span text:style-name="Source_20_Text">https://github.com/kalitalech-hash/andromeda</text:span>.</text:p>
      <text:p text:style-name="Text_20_body">The workflow was designed as a reproducible and auditable human-in-the-loop pipeline. Each stage generated separate output files, including transformed datasets, quality-control tables, transformation logs, summary reports, and analytical figures. This structure preserved the traceability of decisions from raw keywords to final analytical concepts and allowed potentially contestable steps, such as broad semantic aggregation or exclusion of non-substantive categories, to be documented separately.</text:p>
      <text:h text:style-name="Heading_20_3" text:outline-level="3">Methodological note on comparability</text:h>
      <text:p text:style-name="Text_20_body">The present study should be understood as a comparative semantic reconstruction rather than a fully standardized meta-analysis of three identical datasets. The three corpora were collected from different journal websites, had different metadata structures, and were processed at different stages of the broader research programme. The most recent corpus, <text:span text:style-name="Emphasis">Archives of Psychiatry and Psychotherapy</text:span>, was processed with the most refined version of the pipeline. The two earlier corpora, <text:span text:style-name="Emphasis">Psychoterapia</text:span> and <text:span text:style-name="Emphasis">Psychiatria Polska</text:span>, had already been analysed and described in previous studies. Therefore, the comparative conclusions are based primarily on robust, higher-level thematic patterns rather than on exact one-to-one equivalence of every keyword category.</text:p>
      <text:p text:style-name="Text_20_body">This approach is appropriate for the aim of the study, which is not to rank the journals mechanically, but to reconstruct the place of psychotherapy within a broader map of mental health discourse. The comparison therefore emphasizes thematic profiles, temporal tendencies, and conceptual neighbourhoods rather than isolated keyword counts.</text:p>
      <text:p text:style-name="Text_20_body"/>
      <text:h text:style-name="Heading_20_2" text:outline-level="2">Results</text:h>
      <text:p text:style-name="Text_20_body">The comparative analysis examined three journal corpora representing different segments of the mental health field: <text:span text:style-name="Emphasis">Psychoterapia</text:span>, <text:span text:style-name="Emphasis">Psychiatria Polska</text:span>, and <text:span text:style-name="Emphasis">Archives of Psychiatry and Psychotherapy</text:span>. Together, these corpora provide a broad view of the scientific discourse of psychotherapy, psychiatry, and clinical psychology in the period 2005–2025. The analyses of <text:span text:style-name="Emphasis">Psychoterapia</text:span> and <text:span text:style-name="Emphasis">Psychiatria Polska</text:span> had been conducted previously, while the <text:span text:style-name="Emphasis">Archives of Psychiatry and Psychotherapy</text:span> corpus was newly collected, cleaned, semantically aggregated, and analysed as part of the present study.</text:p>
      <text:p text:style-name="Text_20_body">The <text:span text:style-name="Emphasis">Psychoterapia</text:span> corpus included 364 articles published between 2005 and 2025. In this corpus, 1,180 keyword records were identified, corresponding to an average of approximately 3.2 keywords <text:soft-page-break/>per article. After linguistic normalization and semantic merging, 599 unique analytical terms were obtained. The <text:span text:style-name="Emphasis">Psychiatria Polska</text:span> corpus included 1,345 articles published between 2007 and 2025 and contained 2,675 keyword records. After normalization and semantic merging, 391 unique analytical terms were obtained. The final <text:span text:style-name="Emphasis">Archives of Psychiatry and Psychotherapy</text:span> corpus included 684 articles with at least one analytical keyword, 2,573 keyword-long records, and 515 unique analytical concepts after semantic aggregation and audit.</text:p>
      <text:p text:style-name="Text_20_body">Taken together, the three corpora comprised 2,393 articles and 6,428 keyword or keyword-long records. Although the three corpora differed in size, thematic scope, and degree of disciplinary specialization, they could be compared at the level of broader semantic categories and thematic families.</text:p>
      <text:p text:style-name="Text_20_body"><text:span text:style-name="Strong_20_Emphasis">Table 1. General structure of the three corpora</text:sp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Journal</text:p>
            </table:table-cell>
            <table:table-cell table:style-name="Tabela1.A1" office:value-type="string">
              <text:p text:style-name="Table_20_Heading">Period</text:p>
            </table:table-cell>
            <table:table-cell table:style-name="Tabela1.A1" office:value-type="string">
              <text:p text:style-name="Table_20_Heading">Articles</text:p>
            </table:table-cell>
            <table:table-cell table:style-name="Tabela1.A1" office:value-type="string">
              <text:p text:style-name="Table_20_Heading">Keyword records</text:p>
            </table:table-cell>
            <table:table-cell table:style-name="Tabela1.A1" office:value-type="string">
              <text:p text:style-name="Table_20_Heading">Final analytical terms / concepts</text:p>
            </table:table-cell>
          </table:table-row>
        </table:table-header-rows>
        <table:table-row>
          <table:table-cell table:style-name="Tabela1.A1" office:value-type="string">
            <text:p text:style-name="Table_20_Contents"><text:span text:style-name="Emphasis">Psychoterapia</text:span></text:p>
          </table:table-cell>
          <table:table-cell table:style-name="Tabela1.A1" office:value-type="string">
            <text:p text:style-name="Table_20_Contents">2005–2025</text:p>
          </table:table-cell>
          <table:table-cell table:style-name="Tabela1.A1" office:value-type="string">
            <text:p text:style-name="Table_20_Contents">364</text:p>
          </table:table-cell>
          <table:table-cell table:style-name="Tabela1.A1" office:value-type="string">
            <text:p text:style-name="Table_20_Contents">1,180</text:p>
          </table:table-cell>
          <table:table-cell table:style-name="Tabela1.A1" office:value-type="string">
            <text:p text:style-name="Table_20_Contents">599</text:p>
          </table:table-cell>
        </table:table-row>
        <table:table-row>
          <table:table-cell table:style-name="Tabela1.A1" office:value-type="string">
            <text:p text:style-name="Table_20_Contents"><text:span text:style-name="Emphasis">Psychiatria Polska</text:span></text:p>
          </table:table-cell>
          <table:table-cell table:style-name="Tabela1.A1" office:value-type="string">
            <text:p text:style-name="Table_20_Contents">2007–2025</text:p>
          </table:table-cell>
          <table:table-cell table:style-name="Tabela1.A1" office:value-type="string">
            <text:p text:style-name="Table_20_Contents">1,345</text:p>
          </table:table-cell>
          <table:table-cell table:style-name="Tabela1.A1" office:value-type="string">
            <text:p text:style-name="Table_20_Contents">2,675</text:p>
          </table:table-cell>
          <table:table-cell table:style-name="Tabela1.A1" office:value-type="string">
            <text:p text:style-name="Table_20_Contents">391</text:p>
          </table:table-cell>
        </table:table-row>
        <table:table-row>
          <table:table-cell table:style-name="Tabela1.A1" office:value-type="string">
            <text:p text:style-name="Table_20_Contents"><text:span text:style-name="Emphasis">Archives of Psychiatry and Psychotherapy</text:span></text:p>
          </table:table-cell>
          <table:table-cell table:style-name="Tabela1.A1" office:value-type="string">
            <text:p text:style-name="Table_20_Contents">2005–2025</text:p>
          </table:table-cell>
          <table:table-cell table:style-name="Tabela1.A1" office:value-type="string">
            <text:p text:style-name="Table_20_Contents">684</text:p>
          </table:table-cell>
          <table:table-cell table:style-name="Tabela1.A1" office:value-type="string">
            <text:p text:style-name="Table_20_Contents">2,573</text:p>
          </table:table-cell>
          <table:table-cell table:style-name="Tabela1.A1" office:value-type="string">
            <text:p text:style-name="Table_20_Contents">515</text:p>
          </table:table-cell>
        </table:table-row>
        <table:table-row>
          <table:table-cell table:style-name="Tabela1.A1" office:value-type="string">
            <text:p text:style-name="Table_20_Contents"><text:span text:style-name="Strong_20_Emphasis">Total</text:span></text:p>
          </table:table-cell>
          <table:table-cell table:style-name="Tabela1.A1" office:value-type="string">
            <text:p text:style-name="Table_20_Contents">2005/2007–2025</text:p>
          </table:table-cell>
          <table:table-cell table:style-name="Tabela1.A1" office:value-type="string">
            <text:p text:style-name="Table_20_Contents"><text:span text:style-name="Strong_20_Emphasis">2,393</text:span></text:p>
          </table:table-cell>
          <table:table-cell table:style-name="Tabela1.A1" office:value-type="string">
            <text:p text:style-name="Table_20_Contents"><text:span text:style-name="Strong_20_Emphasis">6,428</text:span></text:p>
          </table:table-cell>
          <table:table-cell table:style-name="Tabela1.A1" office:value-type="string">
            <text:p text:style-name="Table_20_Contents">—</text:p>
          </table:table-cell>
        </table:table-row>
      </table:table>
      <text:h text:style-name="Heading_20_3" text:outline-level="3">General thematic profiles of the three journals</text:h>
      <text:p text:style-name="Text_20_body">The three journals differed clearly in their thematic centres. <text:span text:style-name="Emphasis">Psychoterapia</text:span> was organized primarily around psychotherapy as a clinical practice, theoretical field, and process of therapeutic work. Its most frequent themes included the general process of psychotherapy, psychodynamic psychotherapy, personality disorders, cognitive-behavioural therapy, anxiety, couples therapy, borderline personality organization, developmental perspectives, trauma, and depression. This profile indicates that the journal’s discourse was centred on therapeutic modalities, the therapeutic relationship, clinical work with patients, and reflection on the process of psychotherapy.</text:p>
      <text:p text:style-name="Text_20_body"><text:span text:style-name="Emphasis">Psychiatria Polska</text:span> represented a broader psychiatric field. The most frequent themes in this corpus were child and adolescent psychiatry, pharmacotherapy, schizophrenia, depression, neuropsychology, psychometry, psychotherapy, suicide, addiction, and neurobiology. Child and adolescent psychiatry was the most frequent analytical term, with 224 records, followed by pharmacotherapy with 216 records, schizophrenia with 200 records, depression with 186 records, and neuropsychology with 183 records. This profile indicates a discourse organized around psychiatric diagnosis, treatment, developmental psychiatry, neuropsychological functioning, pharmacological intervention, measurement, and institutional forms of care.</text:p>
      <text:p text:style-name="Text_20_body"><text:span text:style-name="Emphasis">Archives of Psychiatry and Psychotherapy</text:span> occupied an intermediate position between these two profiles. Its most frequent analytical concepts were schizophrenia and psychotic disorders, personality disorders and personality traits, therapeutic interventions and rehabilitation, somatic illness and medical comorbidity, trauma and PTSD, social functioning and social support, substance use disorders and addictions, self-esteem and identity, eating disorders and body image, and depression. This profile indicates that <text:span text:style-name="Emphasis">Archives</text:span> combines a psychiatric-clinical core with a strong interest in psychological functioning, intervention, rehabilitation, and psychosocial context.</text:p>
      <text:p text:style-name="Text_20_body"><text:soft-page-break/><text:span text:style-name="Strong_20_Emphasis">Table 2. Dominant thematic areas in the three corpora</text:span></text:p>
      <table:table table:name="Tabela2" table:style-name="Tabela2">
        <table:table-column table:style-name="Tabela2.A"/>
        <table:table-column table:style-name="Tabela2.B"/>
        <table:table-header-rows>
          <table:table-row>
            <table:table-cell table:style-name="Tabela2.A1" office:value-type="string">
              <text:p text:style-name="Table_20_Heading">Journal</text:p>
            </table:table-cell>
            <table:table-cell table:style-name="Tabela2.A1" office:value-type="string">
              <text:p text:style-name="Table_20_Heading">Most frequent themes</text:p>
            </table:table-cell>
          </table:table-row>
        </table:table-header-rows>
        <table:table-row>
          <table:table-cell table:style-name="Tabela2.A1" office:value-type="string">
            <text:p text:style-name="Table_20_Contents"><text:span text:style-name="Emphasis">Psychoterapia</text:span></text:p>
          </table:table-cell>
          <table:table-cell table:style-name="Tabela2.A1" office:value-type="string">
            <text:p text:style-name="Table_20_Contents">Psychotherapy process, psychodynamic psychotherapy, personality disorders, CBT, anxiety, couples therapy, borderline, developmental perspective, trauma, depression</text:p>
          </table:table-cell>
        </table:table-row>
        <table:table-row>
          <table:table-cell table:style-name="Tabela2.A1" office:value-type="string">
            <text:p text:style-name="Table_20_Contents"><text:span text:style-name="Emphasis">Psychiatria Polska</text:span></text:p>
          </table:table-cell>
          <table:table-cell table:style-name="Tabela2.A1" office:value-type="string">
            <text:p text:style-name="Table_20_Contents">Child and adolescent psychiatry, pharmacotherapy, schizophrenia, depression, neuropsychology, psychometry, psychotherapy, suicide, addiction, neurobiology</text:p>
          </table:table-cell>
        </table:table-row>
        <table:table-row>
          <table:table-cell table:style-name="Tabela2.A1" office:value-type="string">
            <text:p text:style-name="Table_20_Contents"><text:span text:style-name="Emphasis">Archives of Psychiatry and Psychotherapy</text:span></text:p>
          </table:table-cell>
          <table:table-cell table:style-name="Tabela2.A1" office:value-type="string">
            <text:p text:style-name="Table_20_Contents">Schizophrenia and psychotic disorders, personality disorders and traits, therapeutic interventions and rehabilitation, somatic comorbidity, trauma/PTSD, social functioning, addictions, self-esteem and identity, eating disorders, depression</text:p>
          </table:table-cell>
        </table:table-row>
      </table:table>
      <text:p text:style-name="Text_20_body">This comparison shows that the three journals do not duplicate one another. Rather, they represent three distinct but overlapping perspectives on the mental health field. <text:span text:style-name="Emphasis">Psychoterapia</text:span> reflects a micro-level discourse of therapeutic process, modality, relationship, and clinical encounter. <text:span text:style-name="Emphasis">Psychiatria Polska</text:span> reflects a macro-level discourse of psychiatry as a medical, diagnostic, developmental, pharmacological, and institutional discipline. <text:span text:style-name="Emphasis">Archives of Psychiatry and Psychotherapy</text:span> reflects a meso-level clinical discourse linking psychiatric disorders, psychotherapeutic intervention, psychological functioning, rehabilitation, and psychosocial context.</text:p>
      <text:h text:style-name="Heading_20_3" text:outline-level="3">Position of psychotherapy within the three corpora</text:h>
      <text:p text:style-name="Text_20_body">The position of psychotherapy differed across the journals, but in all three corpora it was located within a clinical field rather than a primarily non-clinical discourse of personal development. In <text:span text:style-name="Emphasis">Psychoterapia</text:span>, psychotherapy was the central organizing category. It appeared in connection with therapeutic modalities, especially psychodynamic, cognitive-behavioural, systemic, couples, and online therapy, as well as with process-oriented themes such as the therapeutic relationship, supervision, therapist experience, trauma, personality disorders, and anxiety. The discourse of this journal therefore positioned psychotherapy as a pluralistic clinical practice, with a strong emphasis on relational and processual aspects.</text:p>
      <text:p text:style-name="Text_20_body">In <text:span text:style-name="Emphasis">Psychiatria Polska</text:span>, psychotherapy appeared within the broader psychiatric landscape. It was not the central axis of the journal, but it was one of the most frequent substantive themes, with 66 records in the final analytical vocabulary. It appeared alongside child and adolescent psychiatry, pharmacotherapy, schizophrenia, depression, neuropsychology, psychometry, suicide, addiction, and neurobiology. This indicates that, in the psychiatric corpus, psychotherapy was treated as part of the field of psychiatric and mental health care rather than as an autonomous practice of personal growth.</text:p>
      <text:p text:style-name="Text_20_body">In <text:span text:style-name="Emphasis">Archives of Psychiatry and Psychotherapy</text:span>, psychotherapy was embedded within a hybrid clinical structure. It was linked to therapeutic interventions, rehabilitation, trauma, anxiety, personality, psychosis, comorbidity, functioning, and clinical assessment. The journal’s discourse therefore positioned psychotherapy not as an isolated modality, but as one element of a broader clinical system involving diagnosis, intervention, rehabilitation, and psychosocial care.</text:p>
      <text:p text:style-name="Text_20_body">Taken together, these patterns support the interpretation that, in the analysed scientific discourse, psychotherapy is primarily situated within the field of mental health care and the treatment of psychological suffering and mental disorders. Themes associated with general personal <text:soft-page-break/>development, life effectiveness, or lifestyle self-improvement did not form the central structure of any of the three corpora.</text:p>
      <text:h text:style-name="Heading_20_3" text:outline-level="3">Temporal development and thematic change</text:h>
      <text:p text:style-name="Text_20_body">The temporal analyses revealed both journal-specific trajectories and broader patterns shared across the mental health field. In <text:span text:style-name="Emphasis">Psychoterapia</text:span>, the main developmental tendency was the coexistence of a stable psychodynamic-relational core with the increasing visibility of cognitive-behavioural therapy, online psychotherapy, supervision, and process-oriented reflection. The journal’s discourse remained pluralistic, but it gradually incorporated new therapeutic approaches and new conditions of clinical practice.</text:p>
      <text:p text:style-name="Text_20_body">In <text:span text:style-name="Emphasis">Psychiatria Polska</text:span>, the number of keyword records increased from 499 in the period 2007–2011 to 816 in 2017–2021, and then remained high at 593 in 2022–2025. The temporal analysis showed a marked increase in child and adolescent psychiatry, pharmacotherapy, and neuropsychology. Child and adolescent psychiatry rose from 1 record in 2007–2011 to 76 records in 2022–2025. Pharmacotherapy increased from 27 to 70 records, and neuropsychology from 4 to 45 records. Psychotherapy also increased, from 5 records in the first period to 11 in the last period. At the same time, schizophrenia and depression remained highly relevant but showed a relative decline in frequency.</text:p>
      <text:p text:style-name="Text_20_body"><text:span text:style-name="Strong_20_Emphasis">Table 3. Main themes in </text:span><text:span text:style-name="Strong_20_Emphasis"><text:span text:style-name="Emphasis">Psychiatria Polska</text:span></text:span><text:span text:style-name="Strong_20_Emphasis"> across analytical periods</text:span></text:p>
      <table:table table:name="Tabela3" table:style-name="Tabela3">
        <table:table-column table:style-name="Tabela3.A"/>
        <table:table-column table:style-name="Tabela3.B"/>
        <table:table-column table:style-name="Tabela3.C" table:number-columns-repeated="2"/>
        <table:table-column table:style-name="Tabela3.E"/>
        <table:table-header-rows>
          <table:table-row>
            <table:table-cell table:style-name="Tabela3.A1" office:value-type="string">
              <text:p text:style-name="Table_20_Heading">Theme</text:p>
            </table:table-cell>
            <table:table-cell table:style-name="Tabela3.A1" office:value-type="string">
              <text:p text:style-name="Table_20_Heading">2007–2011</text:p>
            </table:table-cell>
            <table:table-cell table:style-name="Tabela3.A1" office:value-type="string">
              <text:p text:style-name="Table_20_Heading">2012–2016</text:p>
            </table:table-cell>
            <table:table-cell table:style-name="Tabela3.A1" office:value-type="string">
              <text:p text:style-name="Table_20_Heading">2017–2021</text:p>
            </table:table-cell>
            <table:table-cell table:style-name="Tabela3.A1" office:value-type="string">
              <text:p text:style-name="Table_20_Heading">2022–2025</text:p>
            </table:table-cell>
          </table:table-row>
        </table:table-header-rows>
        <table:table-row>
          <table:table-cell table:style-name="Tabela3.A1" office:value-type="string">
            <text:p text:style-name="Table_20_Contents">Child and adolescent psychiatry</text:p>
          </table:table-cell>
          <table:table-cell table:style-name="Tabela3.A1" office:value-type="string">
            <text:p text:style-name="Table_20_Contents">1</text:p>
          </table:table-cell>
          <table:table-cell table:style-name="Tabela3.A1" office:value-type="string">
            <text:p text:style-name="Table_20_Contents">63</text:p>
          </table:table-cell>
          <table:table-cell table:style-name="Tabela3.A1" office:value-type="string">
            <text:p text:style-name="Table_20_Contents">84</text:p>
          </table:table-cell>
          <table:table-cell table:style-name="Tabela3.A1" office:value-type="string">
            <text:p text:style-name="Table_20_Contents">76</text:p>
          </table:table-cell>
        </table:table-row>
        <table:table-row>
          <table:table-cell table:style-name="Tabela3.A1" office:value-type="string">
            <text:p text:style-name="Table_20_Contents">Pharmacotherapy</text:p>
          </table:table-cell>
          <table:table-cell table:style-name="Tabela3.A1" office:value-type="string">
            <text:p text:style-name="Table_20_Contents">27</text:p>
          </table:table-cell>
          <table:table-cell table:style-name="Tabela3.A1" office:value-type="string">
            <text:p text:style-name="Table_20_Contents">48</text:p>
          </table:table-cell>
          <table:table-cell table:style-name="Tabela3.A1" office:value-type="string">
            <text:p text:style-name="Table_20_Contents">71</text:p>
          </table:table-cell>
          <table:table-cell table:style-name="Tabela3.A1" office:value-type="string">
            <text:p text:style-name="Table_20_Contents">70</text:p>
          </table:table-cell>
        </table:table-row>
        <table:table-row>
          <table:table-cell table:style-name="Tabela3.A1" office:value-type="string">
            <text:p text:style-name="Table_20_Contents">Schizophrenia</text:p>
          </table:table-cell>
          <table:table-cell table:style-name="Tabela3.A1" office:value-type="string">
            <text:p text:style-name="Table_20_Contents">63</text:p>
          </table:table-cell>
          <table:table-cell table:style-name="Tabela3.A1" office:value-type="string">
            <text:p text:style-name="Table_20_Contents">60</text:p>
          </table:table-cell>
          <table:table-cell table:style-name="Tabela3.A1" office:value-type="string">
            <text:p text:style-name="Table_20_Contents">45</text:p>
          </table:table-cell>
          <table:table-cell table:style-name="Tabela3.A1" office:value-type="string">
            <text:p text:style-name="Table_20_Contents">32</text:p>
          </table:table-cell>
        </table:table-row>
        <table:table-row>
          <table:table-cell table:style-name="Tabela3.A1" office:value-type="string">
            <text:p text:style-name="Table_20_Contents">Depression</text:p>
          </table:table-cell>
          <table:table-cell table:style-name="Tabela3.A1" office:value-type="string">
            <text:p text:style-name="Table_20_Contents">46</text:p>
          </table:table-cell>
          <table:table-cell table:style-name="Tabela3.A1" office:value-type="string">
            <text:p text:style-name="Table_20_Contents">56</text:p>
          </table:table-cell>
          <table:table-cell table:style-name="Tabela3.A1" office:value-type="string">
            <text:p text:style-name="Table_20_Contents">47</text:p>
          </table:table-cell>
          <table:table-cell table:style-name="Tabela3.A1" office:value-type="string">
            <text:p text:style-name="Table_20_Contents">37</text:p>
          </table:table-cell>
        </table:table-row>
        <table:table-row>
          <table:table-cell table:style-name="Tabela3.A1" office:value-type="string">
            <text:p text:style-name="Table_20_Contents">Neuropsychology</text:p>
          </table:table-cell>
          <table:table-cell table:style-name="Tabela3.A1" office:value-type="string">
            <text:p text:style-name="Table_20_Contents">4</text:p>
          </table:table-cell>
          <table:table-cell table:style-name="Tabela3.A1" office:value-type="string">
            <text:p text:style-name="Table_20_Contents">47</text:p>
          </table:table-cell>
          <table:table-cell table:style-name="Tabela3.A1" office:value-type="string">
            <text:p text:style-name="Table_20_Contents">87</text:p>
          </table:table-cell>
          <table:table-cell table:style-name="Tabela3.A1" office:value-type="string">
            <text:p text:style-name="Table_20_Contents">45</text:p>
          </table:table-cell>
        </table:table-row>
        <table:table-row>
          <table:table-cell table:style-name="Tabela3.A1" office:value-type="string">
            <text:p text:style-name="Table_20_Contents">Psychometry</text:p>
          </table:table-cell>
          <table:table-cell table:style-name="Tabela3.A1" office:value-type="string">
            <text:p text:style-name="Table_20_Contents">18</text:p>
          </table:table-cell>
          <table:table-cell table:style-name="Tabela3.A1" office:value-type="string">
            <text:p text:style-name="Table_20_Contents">24</text:p>
          </table:table-cell>
          <table:table-cell table:style-name="Tabela3.A1" office:value-type="string">
            <text:p text:style-name="Table_20_Contents">19</text:p>
          </table:table-cell>
          <table:table-cell table:style-name="Tabela3.A1" office:value-type="string">
            <text:p text:style-name="Table_20_Contents">5</text:p>
          </table:table-cell>
        </table:table-row>
        <table:table-row>
          <table:table-cell table:style-name="Tabela3.A1" office:value-type="string">
            <text:p text:style-name="Table_20_Contents">Psychotherapy</text:p>
          </table:table-cell>
          <table:table-cell table:style-name="Tabela3.A1" office:value-type="string">
            <text:p text:style-name="Table_20_Contents">5</text:p>
          </table:table-cell>
          <table:table-cell table:style-name="Tabela3.A1" office:value-type="string">
            <text:p text:style-name="Table_20_Contents">22</text:p>
          </table:table-cell>
          <table:table-cell table:style-name="Tabela3.A1" office:value-type="string">
            <text:p text:style-name="Table_20_Contents">28</text:p>
          </table:table-cell>
          <table:table-cell table:style-name="Tabela3.A1" office:value-type="string">
            <text:p text:style-name="Table_20_Contents">11</text:p>
          </table:table-cell>
        </table:table-row>
        <table:table-row>
          <table:table-cell table:style-name="Tabela3.A1" office:value-type="string">
            <text:p text:style-name="Table_20_Contents">Suicide</text:p>
          </table:table-cell>
          <table:table-cell table:style-name="Tabela3.A1" office:value-type="string">
            <text:p text:style-name="Table_20_Contents">5</text:p>
          </table:table-cell>
          <table:table-cell table:style-name="Tabela3.A1" office:value-type="string">
            <text:p text:style-name="Table_20_Contents">15</text:p>
          </table:table-cell>
          <table:table-cell table:style-name="Tabela3.A1" office:value-type="string">
            <text:p text:style-name="Table_20_Contents">15</text:p>
          </table:table-cell>
          <table:table-cell table:style-name="Tabela3.A1" office:value-type="string">
            <text:p text:style-name="Table_20_Contents">8</text:p>
          </table:table-cell>
        </table:table-row>
        <table:table-row>
          <table:table-cell table:style-name="Tabela3.A1" office:value-type="string">
            <text:p text:style-name="Table_20_Contents">Addiction</text:p>
          </table:table-cell>
          <table:table-cell table:style-name="Tabela3.A1" office:value-type="string">
            <text:p text:style-name="Table_20_Contents">7</text:p>
          </table:table-cell>
          <table:table-cell table:style-name="Tabela3.A1" office:value-type="string">
            <text:p text:style-name="Table_20_Contents">10</text:p>
          </table:table-cell>
          <table:table-cell table:style-name="Tabela3.A1" office:value-type="string">
            <text:p text:style-name="Table_20_Contents">13</text:p>
          </table:table-cell>
          <table:table-cell table:style-name="Tabela3.A1" office:value-type="string">
            <text:p text:style-name="Table_20_Contents">8</text:p>
          </table:table-cell>
        </table:table-row>
        <table:table-row>
          <table:table-cell table:style-name="Tabela3.A1" office:value-type="string">
            <text:p text:style-name="Table_20_Contents">Neurobiology</text:p>
          </table:table-cell>
          <table:table-cell table:style-name="Tabela3.A1" office:value-type="string">
            <text:p text:style-name="Table_20_Contents">6</text:p>
          </table:table-cell>
          <table:table-cell table:style-name="Tabela3.A1" office:value-type="string">
            <text:p text:style-name="Table_20_Contents">13</text:p>
          </table:table-cell>
          <table:table-cell table:style-name="Tabela3.A1" office:value-type="string">
            <text:p text:style-name="Table_20_Contents">9</text:p>
          </table:table-cell>
          <table:table-cell table:style-name="Tabela3.A1" office:value-type="string">
            <text:p text:style-name="Table_20_Contents">3</text:p>
          </table:table-cell>
        </table:table-row>
      </table:table>
      <text:p text:style-name="Text_20_body">The strongest increases in <text:span text:style-name="Emphasis">Psychiatria Polska</text:span> were observed for child and adolescent psychiatry (+75 records between the first and last periods), pharmacotherapy (+43), neuropsychology (+41), youth (+7), psychotherapy (+6), sexuality (+6), sexual minorities (+5), trauma (+4), PTSD (+4), and autism (+4). The strongest relative decreases were observed for schizophrenia (−31), genetics (−13), psychometry (−13), depression (−9), gender (−8), asthma (−6), neurotransmitters (−6), self-esteem (−6), therapy (−5), and hormones (−5).</text:p>
      <text:p text:style-name="Text_20_body">In <text:span text:style-name="Emphasis">Archives of Psychiatry and Psychotherapy</text:span>, the strongest growth between 2005–2009 and 2020–2025 was observed for therapeutic interventions and rehabilitation, COVID-19 and the pandemic, anxiety and anxiety disorders, trauma and PTSD, clinical psychology and psychological concepts, somatic illness and medical comorbidity, emotion regulation, digital technologies and the internet, substance use disorders and addictions, and adulthood/life stages. The strongest increase was observed for therapeutic interventions and rehabilitation, which rose from 12 articles in the first <text:soft-page-break/>period to 52 articles in the last period. COVID-19 and the pandemic emerged as a new topic in the final period, reaching 24 articles.</text:p>
      <text:p text:style-name="Text_20_body"><text:span text:style-name="Strong_20_Emphasis">Table 4. Main rising themes in </text:span><text:span text:style-name="Strong_20_Emphasis"><text:span text:style-name="Emphasis">Archives of Psychiatry and Psychotherapy</text:span></text:span></text:p>
      <table:table table:name="Tabela4" table:style-name="Tabela4">
        <table:table-column table:style-name="Tabela4.A"/>
        <table:table-column table:style-name="Tabela4.B" table:number-columns-repeated="2"/>
        <table:table-column table:style-name="Tabela4.D"/>
        <table:table-header-rows>
          <table:table-row>
            <table:table-cell table:style-name="Tabela4.A1" office:value-type="string">
              <text:p text:style-name="Table_20_Heading">Theme</text:p>
            </table:table-cell>
            <table:table-cell table:style-name="Tabela4.A1" office:value-type="string">
              <text:p text:style-name="Table_20_Heading">2005–2009</text:p>
            </table:table-cell>
            <table:table-cell table:style-name="Tabela4.A1" office:value-type="string">
              <text:p text:style-name="Table_20_Heading">2020–2025</text:p>
            </table:table-cell>
            <table:table-cell table:style-name="Tabela4.A1" office:value-type="string">
              <text:p text:style-name="Table_20_Heading">Change in percentage points</text:p>
            </table:table-cell>
          </table:table-row>
        </table:table-header-rows>
        <table:table-row>
          <table:table-cell table:style-name="Tabela4.A1" office:value-type="string">
            <text:p text:style-name="Table_20_Contents">Therapeutic interventions and rehabilitation</text:p>
          </table:table-cell>
          <table:table-cell table:style-name="Tabela4.A1" office:value-type="string">
            <text:p text:style-name="Table_20_Contents">12</text:p>
          </table:table-cell>
          <table:table-cell table:style-name="Tabela4.A1" office:value-type="string">
            <text:p text:style-name="Table_20_Contents">52</text:p>
          </table:table-cell>
          <table:table-cell table:style-name="Tabela4.A1" office:value-type="string">
            <text:p text:style-name="Table_20_Contents">+17.41</text:p>
          </table:table-cell>
        </table:table-row>
        <table:table-row>
          <table:table-cell table:style-name="Tabela4.A1" office:value-type="string">
            <text:p text:style-name="Table_20_Contents">COVID-19 and the pandemic</text:p>
          </table:table-cell>
          <table:table-cell table:style-name="Tabela4.A1" office:value-type="string">
            <text:p text:style-name="Table_20_Contents">0</text:p>
          </table:table-cell>
          <table:table-cell table:style-name="Tabela4.A1" office:value-type="string">
            <text:p text:style-name="Table_20_Contents">24</text:p>
          </table:table-cell>
          <table:table-cell table:style-name="Tabela4.A1" office:value-type="string">
            <text:p text:style-name="Table_20_Contents">+11.88</text:p>
          </table:table-cell>
        </table:table-row>
        <table:table-row>
          <table:table-cell table:style-name="Tabela4.A1" office:value-type="string">
            <text:p text:style-name="Table_20_Contents">Anxiety and anxiety disorders</text:p>
          </table:table-cell>
          <table:table-cell table:style-name="Tabela4.A1" office:value-type="string">
            <text:p text:style-name="Table_20_Contents">10</text:p>
          </table:table-cell>
          <table:table-cell table:style-name="Tabela4.A1" office:value-type="string">
            <text:p text:style-name="Table_20_Contents">29</text:p>
          </table:table-cell>
          <table:table-cell table:style-name="Tabela4.A1" office:value-type="string">
            <text:p text:style-name="Table_20_Contents">+7.42</text:p>
          </table:table-cell>
        </table:table-row>
        <table:table-row>
          <table:table-cell table:style-name="Tabela4.A1" office:value-type="string">
            <text:p text:style-name="Table_20_Contents">Trauma, PTSD, and stress-related disorders</text:p>
          </table:table-cell>
          <table:table-cell table:style-name="Tabela4.A1" office:value-type="string">
            <text:p text:style-name="Table_20_Contents">10</text:p>
          </table:table-cell>
          <table:table-cell table:style-name="Tabela4.A1" office:value-type="string">
            <text:p text:style-name="Table_20_Contents">28</text:p>
          </table:table-cell>
          <table:table-cell table:style-name="Tabela4.A1" office:value-type="string">
            <text:p text:style-name="Table_20_Contents">+6.92</text:p>
          </table:table-cell>
        </table:table-row>
        <table:table-row>
          <table:table-cell table:style-name="Tabela4.A1" office:value-type="string">
            <text:p text:style-name="Table_20_Contents">Clinical psychology and psychological concepts</text:p>
          </table:table-cell>
          <table:table-cell table:style-name="Tabela4.A1" office:value-type="string">
            <text:p text:style-name="Table_20_Contents">1</text:p>
          </table:table-cell>
          <table:table-cell table:style-name="Tabela4.A1" office:value-type="string">
            <text:p text:style-name="Table_20_Contents">15</text:p>
          </table:table-cell>
          <table:table-cell table:style-name="Tabela4.A1" office:value-type="string">
            <text:p text:style-name="Table_20_Contents">+6.74</text:p>
          </table:table-cell>
        </table:table-row>
        <table:table-row>
          <table:table-cell table:style-name="Tabela4.A1" office:value-type="string">
            <text:p text:style-name="Table_20_Contents">Somatic illness and medical comorbidity</text:p>
          </table:table-cell>
          <table:table-cell table:style-name="Tabela4.A1" office:value-type="string">
            <text:p text:style-name="Table_20_Contents">12</text:p>
          </table:table-cell>
          <table:table-cell table:style-name="Tabela4.A1" office:value-type="string">
            <text:p text:style-name="Table_20_Contents">28</text:p>
          </table:table-cell>
          <table:table-cell table:style-name="Tabela4.A1" office:value-type="string">
            <text:p text:style-name="Table_20_Contents">+5.53</text:p>
          </table:table-cell>
        </table:table-row>
        <table:table-row>
          <table:table-cell table:style-name="Tabela4.A1" office:value-type="string">
            <text:p text:style-name="Table_20_Contents">Emotions, affect, and emotion regulation</text:p>
          </table:table-cell>
          <table:table-cell table:style-name="Tabela4.A1" office:value-type="string">
            <text:p text:style-name="Table_20_Contents">6</text:p>
          </table:table-cell>
          <table:table-cell table:style-name="Tabela4.A1" office:value-type="string">
            <text:p text:style-name="Table_20_Contents">19</text:p>
          </table:table-cell>
          <table:table-cell table:style-name="Tabela4.A1" office:value-type="string">
            <text:p text:style-name="Table_20_Contents">+5.24</text:p>
          </table:table-cell>
        </table:table-row>
        <table:table-row>
          <table:table-cell table:style-name="Tabela4.A1" office:value-type="string">
            <text:p text:style-name="Table_20_Contents">Digital technologies and the internet</text:p>
          </table:table-cell>
          <table:table-cell table:style-name="Tabela4.A1" office:value-type="string">
            <text:p text:style-name="Table_20_Contents">0</text:p>
          </table:table-cell>
          <table:table-cell table:style-name="Tabela4.A1" office:value-type="string">
            <text:p text:style-name="Table_20_Contents">8</text:p>
          </table:table-cell>
          <table:table-cell table:style-name="Tabela4.A1" office:value-type="string">
            <text:p text:style-name="Table_20_Contents">+3.96</text:p>
          </table:table-cell>
        </table:table-row>
        <table:table-row>
          <table:table-cell table:style-name="Tabela4.A1" office:value-type="string">
            <text:p text:style-name="Table_20_Contents">Substance use disorders and addictions</text:p>
          </table:table-cell>
          <table:table-cell table:style-name="Tabela4.A1" office:value-type="string">
            <text:p text:style-name="Table_20_Contents">10</text:p>
          </table:table-cell>
          <table:table-cell table:style-name="Tabela4.A1" office:value-type="string">
            <text:p text:style-name="Table_20_Contents">22</text:p>
          </table:table-cell>
          <table:table-cell table:style-name="Tabela4.A1" office:value-type="string">
            <text:p text:style-name="Table_20_Contents">+3.95</text:p>
          </table:table-cell>
        </table:table-row>
        <table:table-row>
          <table:table-cell table:style-name="Tabela4.A1" office:value-type="string">
            <text:p text:style-name="Table_20_Contents">Adults and life stages</text:p>
          </table:table-cell>
          <table:table-cell table:style-name="Tabela4.A1" office:value-type="string">
            <text:p text:style-name="Table_20_Contents">0</text:p>
          </table:table-cell>
          <table:table-cell table:style-name="Tabela4.A1" office:value-type="string">
            <text:p text:style-name="Table_20_Contents">6</text:p>
          </table:table-cell>
          <table:table-cell table:style-name="Tabela4.A1" office:value-type="string">
            <text:p text:style-name="Table_20_Contents">+2.97</text:p>
          </table:table-cell>
        </table:table-row>
      </table:table>
      <text:p text:style-name="Text_20_body">Across the three corpora, several broader tendencies can be identified. First, the discourse gradually expanded beyond classical diagnostic categories toward intervention, process, functioning, development, and psychosocial context. Second, the pandemic and digital forms of care became visible in the most recent period, although their specific meaning differed across journals. In <text:span text:style-name="Emphasis">Psychoterapia</text:span>, digital and online themes were closely related to the transformation of therapeutic practice. In <text:span text:style-name="Emphasis">Archives</text:span>, they appeared as part of a broader clinical and psychosocial response to crisis. In <text:span text:style-name="Emphasis">Psychiatria Polska</text:span>, the relevant changes should be interpreted within the wider psychiatric context of care systems, developmental psychiatry, epidemiology, and public mental health.</text:p>
      <text:p text:style-name="Text_20_body">Third, trauma-related and anxiety-related themes gained importance across the field. In <text:span text:style-name="Emphasis">Psychoterapia</text:span>, trauma was connected with therapeutic work, relational processes, and the experience of patients and therapists. In <text:span text:style-name="Emphasis">Archives</text:span>, trauma and PTSD formed part of a broader clinical-psychological expansion. In <text:span text:style-name="Emphasis">Psychiatria Polska</text:span>, trauma and PTSD increased within a broader psychiatric framework that also included child and adolescent psychiatry, neuropsychology, pharmacotherapy, and social topics such as sexual minorities. This suggests that trauma, anxiety, and stress-related categories may function as transdiagnostic bridges between psychotherapy, psychiatry, and clinical psychology.</text:p>
      <text:h text:style-name="Heading_20_3" text:outline-level="3">Declining and relatively stable themes</text:h>
      <text:p text:style-name="Text_20_body">A relative decline of a theme should not be interpreted as disappearance from the discourse. In several cases, declining relative frequency reflected the diversification of the corpus rather than the loss of a topic’s clinical importance. This was particularly evident in <text:span text:style-name="Emphasis">Archives of Psychiatry and Psychotherapy</text:span>, where schizophrenia and psychotic disorders remained the most frequent analytical concept overall, despite a decrease in relative share between the first and last periods.</text:p>
      <text:p text:style-name="Text_20_body">A similar pattern was visible in <text:span text:style-name="Emphasis">Psychiatria Polska</text:span>. Schizophrenia decreased from 63 records in 2007–2011 to 32 records in 2022–2025, and depression decreased from 46 to 37 records. However, both remained among the most important categories in the corpus. This indicates that classical <text:soft-page-break/>clinical psychiatry did not disappear; rather, its relative share decreased as developmental, pharmacological, neuropsychological, and socio-institutional topics gained prominence.</text:p>
      <text:p text:style-name="Text_20_body">In <text:span text:style-name="Emphasis">Psychoterapia</text:span>, the psychodynamic-relational orientation remained central, even as cognitive-behavioural, online, and process-oriented themes became more visible. This indicates continuity rather than replacement. Across the three corpora, the dominant pattern is therefore not one of simple thematic substitution. It is better described as expansion and redistribution: older core themes remained present, while new themes entered the discourse and changed the relative structure of the field.</text:p>
      <text:h text:style-name="Heading_20_3" text:outline-level="3">Co-occurrence structures and thematic neighbourhoods</text:h>
      <text:p text:style-name="Text_20_body">Co-occurrence analysis was used to reconstruct how concepts were connected within each journal’s discourse. The networks revealed different structures of thematic organization.</text:p>
      <text:p text:style-name="Text_20_body">In <text:span text:style-name="Emphasis">Psychoterapia</text:span>, the co-occurrence structure was centred on psychotherapy as a process and practice. The main clusters included psychodynamic and relational themes, cognitive-behavioural approaches, clinical-diagnostic topics, and systemic or relational work. The central position of psychotherapy-related concepts suggested that the journal functions as a platform integrating multiple therapeutic traditions within a shared clinical field.</text:p>
      <text:p text:style-name="Text_20_body">In <text:span text:style-name="Emphasis">Psychiatria Polska</text:span>, the co-occurrence network had a polycentric structure. After applying a minimum threshold of two co-occurrences, the network consisted of 96 nodes and 184 edges. Seven thematic clusters were detected. The most central terms were child and adolescent psychiatry, pharmacotherapy, neuropsychology, depression, and schizophrenia. The strongest co-occurrence relationships were observed between pharmacotherapy and neuropsychology, depression and pharmacotherapy, and pharmacotherapy and schizophrenia. The largest clusters included: (1) a clinical-neurobiological-pharmacological area dominated by pharmacotherapy, depression, neuropsychology, and neurobiology; (2) a child and adolescent area including autism, ADHD, eating disorders, and adolescents; and (3) a schizophrenia, diagnosis, treatment, and psychometry cluster. Smaller clusters concerned psychotherapy and suicide, trauma and PTSD, stress and aggression, and stress management with immunology.</text:p>
      <text:p text:style-name="Text_20_body">In <text:span text:style-name="Emphasis">Archives of Psychiatry and Psychotherapy</text:span>, the filtered co-occurrence network contained 51 nodes, 181 edges, and 4 thematic communities. The first major cluster may be interpreted as a psychiatric-clinical cluster organized around schizophrenia, psychotic disorders, clinical assessment, pharmacotherapy, symptom severity, and related diagnostic constructs. The second cluster brought together concepts related to personality, identity, self-esteem, emotion regulation, and interpersonal functioning. The third cluster was centred on therapeutic interventions, rehabilitation, psychotherapy, trauma, anxiety, and treatment outcomes. The fourth cluster included broader psychosocial and contextual themes such as somatic comorbidity, social support, quality of life, work and education, family, and the COVID-19 pandemic.</text:p>
      <text:p text:style-name="Text_20_body"><draw:frame draw:style-name="fr2" draw:name="Obraz1" text:anchor-type="char" svg:width="17cm" svg:height="13.561cm" draw:z-index="0"><draw:image xlink:href="Pictures/100000010000117600000DEE1D0A6598.png" xlink:type="simple" xlink:show="embed" xlink:actuate="onLoad" draw:mime-type="image/png"/></draw:frame><text:soft-page-break/></text:p>
      <text:p text:style-name="P5">Figure 1. Co-occurence network...</text:p>
      <text:p text:style-name="Text_20_body">The comparison of co-occurrence structures suggests three complementary levels of mental health discourse. <text:span text:style-name="Emphasis">Psychoterapia</text:span> emphasizes the micro-level of therapeutic process, relationship, modality, and clinical encounter. <text:span text:style-name="Emphasis">Psychiatria Polska</text:span> emphasizes the macro-level of psychiatric diagnosis, pharmacotherapy, neuropsychology, epidemiology, development, and institutional care. <text:span text:style-name="Emphasis">Archives of Psychiatry and Psychotherapy</text:span> occupies an intermediate level, linking psychiatric disorders, clinical psychology, rehabilitation, psychotherapy, and psychosocial functioning.</text:p>
      <text:h text:style-name="Heading_20_3" text:outline-level="3">Comparative interpretation of the three journal profiles</text:h>
      <text:p text:style-name="Text_20_body">The three journals can therefore be interpreted as representing different but interconnected positions within the broader field of mental health science.</text:p>
      <text:p text:style-name="Text_20_body"><text:span text:style-name="Emphasis">Psychoterapia</text:span> represents psychotherapy from within its own professional and theoretical discourse. Its thematic structure is pluralistic, with a stable psychodynamic-relational core and increasing visibility of CBT, online psychotherapy, supervision, process research, and clinical problems such as personality disorders, anxiety, trauma, and depression. The journal’s discourse is centred on therapeutic practice rather than psychiatric classification alone.</text:p>
      <text:p text:style-name="Text_20_body"><text:span text:style-name="Emphasis">Psychiatria Polska</text:span> represents psychiatry as a broad medical and institutional field. Its thematic profile is organized around major diagnostic categories, pharmacotherapy, neuropsychology, <text:soft-page-break/>psychometry, developmental psychiatry, suicide, addiction, neurobiology, epidemiological perspectives, and institutional care. Psychotherapy is present, but it occupies a more peripheral position than strictly clinical, biological, developmental, and pharmacological topics.</text:p>
      <text:p text:style-name="Text_20_body"><text:span text:style-name="Emphasis">Archives of Psychiatry and Psychotherapy</text:span> represents a hybrid clinical discourse. Its thematic centre combines severe psychopathology, especially schizophrenia and psychotic disorders, with personality, therapeutic intervention, rehabilitation, trauma, anxiety, comorbidity, social functioning, and psychological concepts. In this sense, it provides a bridge between the psychotherapeutic and psychiatric corpora.</text:p>
      <text:p text:style-name="Text_20_body"><text:span text:style-name="Strong_20_Emphasis">Table 5. Comparative interpretation of journal-specific discourse levels</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Journal</text:p>
            </table:table-cell>
            <table:table-cell table:style-name="Tabela5.A1" office:value-type="string">
              <text:p text:style-name="Table_20_Heading">Level of discourse</text:p>
            </table:table-cell>
            <table:table-cell table:style-name="Tabela5.A1" office:value-type="string">
              <text:p text:style-name="Table_20_Heading">Main organizing logic</text:p>
            </table:table-cell>
          </table:table-row>
        </table:table-header-rows>
        <table:table-row>
          <table:table-cell table:style-name="Tabela5.A1" office:value-type="string">
            <text:p text:style-name="Table_20_Contents"><text:span text:style-name="Emphasis">Psychoterapia</text:span></text:p>
          </table:table-cell>
          <table:table-cell table:style-name="Tabela5.A1" office:value-type="string">
            <text:p text:style-name="Table_20_Contents">Micro-level of therapeutic process</text:p>
          </table:table-cell>
          <table:table-cell table:style-name="Tabela5.A1" office:value-type="string">
            <text:p text:style-name="Table_20_Contents">Modality, relationship, therapist experience, process, clinical encounter</text:p>
          </table:table-cell>
        </table:table-row>
        <table:table-row>
          <table:table-cell table:style-name="Tabela5.A1" office:value-type="string">
            <text:p text:style-name="Table_20_Contents"><text:span text:style-name="Emphasis">Psychiatria Polska</text:span></text:p>
          </table:table-cell>
          <table:table-cell table:style-name="Tabela5.A1" office:value-type="string">
            <text:p text:style-name="Table_20_Contents">Macro-level of psychiatry as a discipline</text:p>
          </table:table-cell>
          <table:table-cell table:style-name="Tabela5.A1" office:value-type="string">
            <text:p text:style-name="Table_20_Contents">Diagnosis, pharmacotherapy, neuropsychology, development, epidemiology, institutions</text:p>
          </table:table-cell>
        </table:table-row>
        <table:table-row>
          <table:table-cell table:style-name="Tabela5.A1" office:value-type="string">
            <text:p text:style-name="Table_20_Contents"><text:span text:style-name="Emphasis">Archives of Psychiatry and Psychotherapy</text:span></text:p>
          </table:table-cell>
          <table:table-cell table:style-name="Tabela5.A1" office:value-type="string">
            <text:p text:style-name="Table_20_Contents">Meso-level of integrative clinical discourse</text:p>
          </table:table-cell>
          <table:table-cell table:style-name="Tabela5.A1" office:value-type="string">
            <text:p text:style-name="Table_20_Contents">Disorder, intervention, rehabilitation, functioning, psychosocial context</text:p>
          </table:table-cell>
        </table:table-row>
      </table:table>
      <text:p text:style-name="Text_20_body">This three-level structure is one of the main results of the comparative analysis. It suggests that the three journals do not merely cover different topics; rather, they organize the mental health field from different epistemic positions. The same broad area — psychological suffering and mental disorder — is viewed through three different lenses: the therapeutic process, psychiatric medicine, and integrative clinical care.</text:p>
      <text:p text:style-name="Text_20_body"><draw:frame draw:style-name="fr1" draw:name="Obraz2" text:anchor-type="char" svg:width="17cm" svg:height="9.11cm" draw:z-index="1"><draw:image xlink:href="Pictures/1000000100000F1E0000081A1D2546D6.png" xlink:type="simple" xlink:show="embed" xlink:actuate="onLoad" draw:mime-type="image/png"/></draw:frame></text:p>
      <text:h text:style-name="Heading_20_3" text:outline-level="3">Psychotherapy as a clinical rather than merely developmental practice</text:h>
      <text:p text:style-name="Text_20_body">The comparative analysis provides evidence that psychotherapy is consistently embedded in the scientific discourse of mental health. Across the three corpora, psychotherapy is linked to mental <text:soft-page-break/>disorders, suffering, diagnosis, clinical intervention, trauma, depression, anxiety, personality disorders, psychosis, rehabilitation, functioning, and patient care. It is not primarily organized around categories of general personal development, lifestyle optimization, self-improvement, or life effectiveness.</text:p>
      <text:p text:style-name="Text_20_body">This does not mean that psychotherapy lacks developmental, relational, existential, or identity-related dimensions. On the contrary, these dimensions are clearly visible, especially in the <text:span text:style-name="Emphasis">Psychoterapia</text:span> corpus. However, they appear within a clinical framework rather than outside it. In the analysed scientific discourse, personal development and self-exploration are not autonomous foundations of psychotherapy. They are embedded in work with suffering, disorder, relational difficulty, trauma, functioning, and mental health.</text:p>
      <text:p text:style-name="Text_20_body">The comparative map therefore supports the interpretation of psychotherapy as a clinical practice located at the intersection of psychology, psychiatry, and mental health care. <text:span text:style-name="Emphasis">Psychoterapia</text:span> shows psychotherapy as a field of therapeutic process and relational clinical work. <text:span text:style-name="Emphasis">Psychiatria Polska</text:span> shows psychotherapy as one of the recognized components of psychiatric care. <text:span text:style-name="Emphasis">Archives of Psychiatry and Psychotherapy</text:span> shows psychotherapy as part of an integrative clinical discourse linking disorder, intervention, rehabilitation, and psychosocial functioning.</text:p>
      <text:p text:style-name="Text_20_body">Thus, the main comparative result can be formulated as follows: in the scientific discourse represented by these three journals, psychotherapy is not positioned as a general technology of self-improvement, but as a clinically embedded method of understanding and treating mental suffering and mental disorders. Its conceptual neighbourhood is formed primarily by psychiatry, clinical psychology, diagnosis, intervention, rehabilitation, trauma, personality, affective and anxiety disorders, psychosis, developmental psychiatry, and patient functioning.</text:p>
      <text:p text:style-name="Text_20_body"/>
      <text:h text:style-name="Heading_20_2" text:outline-level="2">Discussion</text:h>
      <text:p text:style-name="Text_20_body">The comparative analysis of the three journal corpora makes it possible to view the scientific discourse on psychotherapy and mental health in Poland not as a homogeneous field, but as a set of partially overlapping thematic spaces. Each of the analysed journals represents a different epistemic position within this field. <text:span text:style-name="Emphasis">Psychoterapia</text:span> reflects psychotherapy from within its own professional and theoretical discourse. <text:span text:style-name="Emphasis">Psychiatria Polska</text:span> represents psychiatry as a broad medical, diagnostic, pharmacological, developmental, and institutional discipline. <text:span text:style-name="Emphasis">Archives of Psychiatry and Psychotherapy</text:span> occupies an intermediate position, linking psychiatric disorders, psychotherapeutic intervention, clinical psychology, rehabilitation, and psychosocial functioning. Taken together, these three corpora form a comparative map of how psychotherapy is situated within the wider scientific discourse of mental health.</text:p>
      <text:p text:style-name="Text_20_body">The most important result of the study is that psychotherapy, across the three corpora, appears primarily as a clinically embedded practice. It is consistently connected with mental disorders, psychological suffering, diagnosis, intervention, trauma, anxiety, depression, personality disorders, psychosis, rehabilitation, patient functioning, and broader mental health care. This pattern is visible even though the journals differ substantially in their thematic centres. In <text:span text:style-name="Emphasis">Psychoterapia</text:span>, psychotherapy is the main organizing category and is linked to therapeutic modalities, the therapeutic relationship, supervision, trauma, personality, and clinical work. In <text:span text:style-name="Emphasis">Psychiatria Polska</text:span>, psychotherapy appears as one component of psychiatric care, alongside pharmacotherapy, <text:soft-page-break/>schizophrenia, depression, neuropsychology, child and adolescent psychiatry, suicide, addiction, and psychometry. In <text:span text:style-name="Emphasis">Archives of Psychiatry and Psychotherapy</text:span>, psychotherapy is embedded in an integrative clinical discourse that links disorders, interventions, rehabilitation, psychosocial functioning, and psychological concepts.</text:p>
      <text:p text:style-name="Text_20_body">This finding is relevant to contemporary debates about the status of psychotherapy. The present analysis cannot directly resolve legal or professional questions concerning the regulation of psychotherapy, nor can it determine which educational pathways should grant access to psychotherapeutic practice. However, it provides empirical evidence about the conceptual neighbourhood of psychotherapy in scientific discourse. The results do not support an image of psychotherapy as primarily a general technique of personal development, lifestyle improvement, or self-optimization. Developmental, relational, existential, and identity-related themes are certainly present, especially in the <text:span text:style-name="Emphasis">Psychoterapia</text:span> corpus, but they appear within a clinical framework rather than outside it. In the analysed journals, psychotherapy is most strongly situated in relation to mental suffering, diagnosis, treatment, patient functioning, and mental health care.</text:p>
      <text:p text:style-name="Text_20_body">The comparison also shows that psychotherapy is not reducible to psychiatry, even though it is strongly connected with psychiatric and clinical categories. The three-level structure identified in the results is important in this respect. <text:span text:style-name="Emphasis">Psychoterapia</text:span> represents the micro-level of therapeutic process: the clinical encounter, the therapeutic relationship, modality-specific work, supervision, and the experience of therapists and patients. <text:span text:style-name="Emphasis">Psychiatria Polska</text:span> represents the macro-level of psychiatry as a discipline: diagnosis, pharmacotherapy, epidemiology, developmental psychiatry, neuropsychology, institutional care, and public mental health. <text:span text:style-name="Emphasis">Archives of Psychiatry and Psychotherapy</text:span> represents a meso-level of integrative clinical discourse: disorder, intervention, rehabilitation, functioning, trauma, comorbidity, and psychosocial context. Psychotherapy is present across all three levels, but its meaning shifts depending on the journal’s epistemic position.</text:p>
      <text:p text:style-name="Text_20_body">The profile of <text:span text:style-name="Emphasis">Psychoterapia</text:span> indicates that Polish psychotherapeutic discourse is pluralistic rather than organized around a single theoretical paradigm. The journal contains a stable psychodynamic and relational core, but also includes cognitive-behavioural, systemic, couples, online, and process-oriented themes. This suggests that the psychotherapeutic discourse represented by the journal is not a simple confrontation of competing schools. It is better described as a shared clinical space in which different therapeutic traditions are connected through common problems: suffering, relationship, trauma, personality, anxiety, depression, and the dynamics of change in therapy.</text:p>
      <text:p text:style-name="Text_20_body">The profile of <text:span text:style-name="Emphasis">Psychiatria Polska</text:span> shows a different but complementary pattern. The journal’s discourse is polycentric and organized around several strong domains: child and adolescent psychiatry, pharmacotherapy, schizophrenia, depression, neuropsychology, psychometry, psychotherapy, suicide, addiction, and neurobiology. The strong growth of child and adolescent psychiatry, pharmacotherapy, and neuropsychology points to an expansion of psychiatric discourse toward developmental, neurocognitive, and applied clinical concerns. At the same time, schizophrenia and depression remain important even where their relative frequency declines. This suggests continuity of the classical psychiatric core, accompanied by diversification rather than replacement.</text:p>
      <text:p text:style-name="Text_20_body">The profile of <text:span text:style-name="Emphasis">Archives of Psychiatry and Psychotherapy</text:span> confirms its hybrid character. Its dominant themes include schizophrenia and psychotic disorders, personality disorders and traits, therapeutic interventions and rehabilitation, somatic comorbidity, trauma and PTSD, social functioning, <text:soft-page-break/>addictions, self-esteem and identity, eating disorders, and depression. The strongest growth in this corpus concerned therapeutic interventions and rehabilitation, COVID-19 and the pandemic, anxiety, trauma and PTSD, clinical psychology, somatic comorbidity, emotion regulation, digital technologies, and substance use. This indicates a movement from a more diagnosis-centred discourse toward a broader model that includes intervention, functioning, psychosocial context, crisis, and recovery.</text:p>
      <text:p text:style-name="Text_20_body">Across the three journals, several shared tendencies can be identified. First, the discourse of mental health appears to be expanding beyond classical diagnostic categories toward process, context, intervention, functioning, and development. This does not mean that diagnosis is losing relevance. Rather, diagnostic categories are increasingly embedded in wider networks of meaning that include psychological mechanisms, social context, therapeutic work, rehabilitation, and institutional forms of care. Second, trauma, anxiety, stress-related categories, and psychosocial functioning appear as important transdiagnostic bridges between psychotherapy, psychiatry, and clinical psychology. Third, the COVID-19 pandemic and digital forms of care entered the discourse as markers of changing clinical conditions, although their role differed between journals.</text:p>
      <text:p text:style-name="Text_20_body">The results therefore suggest that the scientific discourse of mental health in Poland has become increasingly multidimensional. In the analysed period, the field does not appear to move from one dominant paradigm to another. Instead, it becomes more differentiated. Classical psychiatric themes persist, psychotherapeutic traditions remain pluralistic, and hybrid clinical-psychological spaces expand. This pattern is important because it shows that the relationship between psychiatry and psychotherapy is not simply hierarchical or oppositional. The two fields overlap through shared clinical objects: suffering, disorder, risk, trauma, functioning, intervention, and care.</text:p>
      <text:p text:style-name="Text_20_body">This interpretation is also supported by the co-occurrence structures. In <text:span text:style-name="Emphasis">Psychoterapia</text:span>, co-occurrence patterns emphasize the therapeutic process and the integration of different psychotherapeutic traditions. In <text:span text:style-name="Emphasis">Psychiatria Polska</text:span>, the network has a polycentric psychiatric structure, with strong clusters around pharmacotherapy, neuropsychology, child and adolescent psychiatry, schizophrenia, psychometry, psychotherapy, suicide, trauma, and PTSD. In <text:span text:style-name="Emphasis">Archives of Psychiatry and Psychotherapy</text:span>, the network links psychiatric diagnosis, personality, intervention, rehabilitation, trauma, anxiety, social functioning, comorbidity, and pandemic-related themes. These networks show that psychotherapy is not isolated from psychiatric and psychological categories, but is embedded in them.</text:p>
      <text:p text:style-name="Text_20_body">The comparative analysis also has implications for how psychotherapy may be described in relation to psychology and psychiatry. The data do not justify a claim that psychotherapy belongs exclusively to one discipline or profession. However, they do support the view that its scientific grounding is strongly clinical and closely connected with psychology, psychiatry, and the broader field of mental health. If psychotherapy is repeatedly positioned in relation to psychopathology, diagnosis, intervention, trauma, affective and anxiety disorders, personality, psychosis, suicide, rehabilitation, and patient functioning, then competences in clinical psychology, psychopathology, diagnosis, risk assessment, and psychiatric context appear central rather than peripheral to the field.</text:p>
      <text:p text:style-name="Text_20_body">The study has several limitations. First, it is based on author-assigned keywords, which are selective and condensed representations of article content. Keywords do not capture the full theoretical, methodological, or clinical complexity of publications. Second, the three corpora were not identical in size, periodization, metadata structure, or processing history. The <text:span text:style-name="Emphasis">Archives of Psychiatry and </text:span><text:soft-page-break/><text:span text:style-name="Emphasis">Psychotherapy</text:span> corpus was processed using the most refined version of the semantic aggregation pipeline, while <text:span text:style-name="Emphasis">Psychoterapia</text:span> and <text:span text:style-name="Emphasis">Psychiatria Polska</text:span> had been analysed earlier. For this reason, the comparison should be understood as a semantic reconstruction of robust thematic patterns rather than as a strictly standardized quantitative meta-analysis.</text:p>
      <text:p text:style-name="Text_20_body">Third, semantic aggregation inevitably involves interpretive decisions. Grouping many specific keywords into broader analytical categories improves comparability and interpretability, but it may reduce the visibility of narrower theoretical distinctions. This risk was mitigated by preserving transformation logs, documenting exclusions, and applying a human-in-the-loop audit. Fourth, the comparison concerns three journals only. Although they are important sites of discourse production, they do not exhaust the entire field of psychotherapy, psychiatry, or clinical psychology in Poland. Books, training materials, clinical guidelines, conference proceedings, and international publications would provide additional perspectives.</text:p>
      <text:p text:style-name="Text_20_body">Future research could extend this comparative framework in several directions. First, the three corpora could be harmonized further using a single shared semantic dictionary and then reanalysed as one integrated dataset. This would make it possible to construct a unified co-occurrence network of Polish mental health discourse. Second, the analysis could be extended to full abstracts or full texts, using topic modelling, semantic embeddings, citation networks, or bibliographic coupling. Third, international comparison would be valuable. A particularly interesting next step would be to compare the Polish psychiatric-psychotherapeutic discourse with psychoanalytic, psychodynamic, or broader psychotherapy corpora from international databases.</text:p>
      <text:p text:style-name="Text_20_body">In summary, the comparative analysis shows that <text:span text:style-name="Emphasis">Psychoterapia</text:span>, <text:span text:style-name="Emphasis">Psychiatria Polska</text:span>, and <text:span text:style-name="Emphasis">Archives of Psychiatry and Psychotherapy</text:span> represent three complementary positions within the mental health field. <text:span text:style-name="Emphasis">Psychoterapia</text:span> maps the micro-level of therapeutic process and relational clinical work. <text:span text:style-name="Emphasis">Psychiatria Polska</text:span> maps the macro-level of psychiatry as a diagnostic, pharmacological, developmental, neuropsychological, and institutional discipline. <text:span text:style-name="Emphasis">Archives of Psychiatry and Psychotherapy</text:span> maps an intermediate clinical space connecting disorder, intervention, rehabilitation, functioning, and psychosocial context. Across all three corpora, psychotherapy appears primarily as a clinically embedded practice situated within the treatment and understanding of mental suffering and mental disorders. It is therefore best understood, in this scientific discourse, not as a general method of self-improvement, but as an integral part of the broader field of mental health care.</text:p>
      <text:h text:style-name="Heading_20_2" text:outline-level="2">Acknowledgements</text:h>
      <text:p text:style-name="Text_20_body"/>
      <text:p text:style-name="Text_20_body">The author thanks the research agent <text:span text:style-name="Strong_20_Emphasis">Andromeda Nowicka</text:span> for support in preparing analytical scripts, processing bibliometric data, performing semantic keyword normalization, and generating preliminary analytical reports used in this study.</text:p>
      <text:p text:style-name="Text_20_body">The present article is the third stage of a broader project mapping the scientific discourse on psychotherapy in Poland across three journal corpora: <text:span text:style-name="Emphasis">Psychoterapia</text:span>, <text:span text:style-name="Emphasis">Psychiatria Polska</text:span>, and <text:span text:style-name="Emphasis">Archives of Psychiatry and Psychotherapy</text:span>. In each stage, Andromeda Nowicka was used as a human-in-the-loop research support agent assisting with reproducible data preparation, semantic normalization, audit documentation, and preliminary interpretation. The agent is acknowledged as a research support system and not as a co-author.</text:p>
      <text:p text:style-name="Text_20_body"><text:soft-page-break/>The agent manifest and project documentation are available in the project repository:<text:line-break/><text:span text:style-name="Source_20_Text">https://github.com/kalitalech-hash/andromeda</text:span></text:p>
      <text:p text:style-name="Text_20_body">Agent identity:<text:line-break/><text:span text:style-name="Source_20_Text">did:web:kalitalech-hash.github.io:andromeda</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17T17:24:25.848000000</meta:creation-date>
    <dc:date>2026-05-17T17:48:17.187000000</dc:date>
    <meta:editing-duration>PT23M52S</meta:editing-duration>
    <meta:editing-cycles>1</meta:editing-cycles>
    <meta:document-statistic meta:table-count="5" meta:image-count="2" meta:object-count="0" meta:page-count="19" meta:paragraph-count="269" meta:word-count="7661" meta:character-count="58851" meta:non-whitespace-character-count="51481"/>
    <meta:generator>LibreOffice/7.6.4.1$Windows_X86_64 LibreOffice_project/e19e193f88cd6c0525a17fb7a176ed8e6a3e2aa1</meta:generator>
  </office:meta>
</office:document-meta>
</file>